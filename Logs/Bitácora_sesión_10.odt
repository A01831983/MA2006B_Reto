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Heading_20_7">
      <style:paragraph-properties fo:text-align="center"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7">BITÁCORA 15 DE MAYO - PRESENTACIÓN ORAL PRIMERA PARTE DEL RETO</text:h>
      <text:p text:style-name="Standard"/>
      <text:h text:style-name="Heading_20_8" text:outline-level="8">Preguntas planteadas</text:h>
      <text:p text:style-name="Standard">El Dr. Raúl Gómez preguntó cuál era nuestra siguiente etapa: respondimos que la de verificación de correos. No hubo más preguntas o follow-up a la anteriormente mencionada.</text:p>
      <text:p text:style-name="Standard"/>
      <text:h text:style-name="Heading_20_8" text:outline-level="8">Comentarios</text:h>
      <text:p text:style-name="Standard">El Dr. Raúl Gómez destacó la inclusión del aspecto “humano”: apreció que explicáramos que el despliegue necesita ser, en mayor o menor medida, guiado con los colaboradores que harán uso de la plataforma (dada la forma en que se comparte la firma digital generada). </text:p>
      <text:p text:style-name="Standard"/>
      <text:h text:style-name="Heading_20_8" text:outline-level="8">Sugerencias y observaciones</text:h>
      <text:p text:style-name="Standard">El Dr. Raúl Gómez sugirió extender las opciones de vigencia del certificado a generar, notando que un solo año podría ser muy poco. El Dr. Alberto F. Martínez de acuerdo, añadiendo que en el SAT la vigencia llega a ser de entre 4 a 5 años. Por tanto, es algo que se considerará dentro de los cambios a realizar. </text:p>
      <text:p text:style-name="Standard">Durante la demostración, mostramos que hay casos que no permitirán registrar a un nuevo usuario (introducir un correo que ya ha sido registrado, no tener dominio, etc.). Con eso en mente, al ocurrir dichos casos, se muestran mensajes de error que indican qué está mal: no obstante, Dr. Raúl Gómez comentó que algunos de los mensajes que se despliegan cuando ocurre el error no son del todo claros. Por tanto, lo corregiremos y haremos más claros para el usuari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15T21:03:30.441812470</meta:creation-date>
    <dc:date>2026-05-15T21:05:47.447838662</dc:date>
    <meta:editing-duration>PT2M17S</meta:editing-duration>
    <meta:editing-cycles>1</meta:editing-cycles>
    <meta:document-statistic meta:table-count="0" meta:image-count="0" meta:object-count="0" meta:page-count="1" meta:paragraph-count="8" meta:word-count="226" meta:character-count="1331" meta:non-whitespace-character-count="1111"/>
    <meta:generator>LibreOffice/25.2.6.2$Linux_X86_64 LibreOffice_project/520$Build-2</meta:generator>
  </office:meta>
</office:document-meta>
</file>